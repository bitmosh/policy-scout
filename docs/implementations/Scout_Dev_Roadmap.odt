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left="0in" fo:margin-right="0in" fo:text-indent="0in" style:auto-text-indent="false" style:writing-mode="lr-tb"/>
    </style:style>
    <style:style style:name="P2" style:family="paragraph" style:parent-style-name="Preformatted_20_Text">
      <style:paragraph-properties fo:margin-top="0in" fo:margin-bottom="0.1965in" style:contextual-spacing="false" style:writing-mode="lr-tb"/>
    </style:style>
    <style:style style:name="P3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4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5" style:family="paragraph" style:parent-style-name="Preformatted_20_Text">
      <style:paragraph-properties style:writing-mode="lr-tb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in" fo:margin-bottom="0in" style:contextual-spacing="false"/>
    </style:style>
    <style:style style:name="P8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style:writing-mode="lr-tb"/>
    </style:style>
    <style:style style:name="P9" style:family="paragraph" style:parent-style-name="Text_20_body" style:list-style-name="L2"/>
    <style:style style:name="P10" style:family="paragraph" style:parent-style-name="Text_20_body" style:list-style-name="L2">
      <style:paragraph-properties fo:margin-top="0in" fo:margin-bottom="0in" style:contextual-spacing="false"/>
    </style:style>
    <style:style style:name="P11" style:family="paragraph" style:parent-style-name="Text_20_body" style:list-style-name="L3"/>
    <style:style style:name="P12" style:family="paragraph" style:parent-style-name="Text_20_body" style:list-style-name="L3">
      <style:paragraph-properties fo:margin-top="0in" fo:margin-bottom="0in" style:contextual-spacing="false"/>
    </style:style>
    <style:style style:name="P13" style:family="paragraph" style:parent-style-name="Text_20_body" style:list-style-name="L4"/>
    <style:style style:name="P14" style:family="paragraph" style:parent-style-name="Text_20_body" style:list-style-name="L4">
      <style:paragraph-properties fo:margin-top="0in" fo:margin-bottom="0in" style:contextual-spacing="false"/>
    </style:style>
    <style:style style:name="P15" style:family="paragraph" style:parent-style-name="Text_20_body" style:list-style-name="L4">
      <style:paragraph-properties fo:margin-left="0in" fo:margin-right="0in" fo:margin-top="0in" fo:margin-bottom="0in" style:contextual-spacing="false" fo:text-indent="0in" style:auto-text-indent="false" style:writing-mode="lr-tb"/>
    </style:style>
    <style:style style:name="P16" style:family="paragraph" style:parent-style-name="Text_20_body" style:list-style-name="L5"/>
    <style:style style:name="P17" style:family="paragraph" style:parent-style-name="Text_20_body" style:list-style-name="L5">
      <style:paragraph-properties fo:margin-top="0in" fo:margin-bottom="0in" style:contextual-spacing="false"/>
    </style:style>
    <style:style style:name="P18" style:family="paragraph" style:parent-style-name="Text_20_body" style:list-style-name="L5">
      <style:paragraph-properties fo:margin-left="0in" fo:margin-right="0in" fo:margin-top="0in" fo:margin-bottom="0in" style:contextual-spacing="false" fo:text-indent="0in" style:auto-text-indent="false" style:writing-mode="lr-tb"/>
    </style:style>
    <style:style style:name="P19" style:family="paragraph" style:parent-style-name="Text_20_body">
      <style:paragraph-properties fo:margin-left="0in" fo:margin-right="0in" fo:text-indent="0in" style:auto-text-indent="false" style:writing-mode="lr-tb"/>
    </style:style>
    <style:style style:name="P20" style:family="paragraph" style:parent-style-name="Text_20_body" style:list-style-name="L6"/>
    <style:style style:name="P21" style:family="paragraph" style:parent-style-name="Text_20_body" style:list-style-name="L6">
      <style:paragraph-properties fo:margin-top="0in" fo:margin-bottom="0in" style:contextual-spacing="false"/>
    </style:style>
    <style:style style:name="P22" style:family="paragraph" style:parent-style-name="Text_20_body" style:list-style-name="L7"/>
    <style:style style:name="P23" style:family="paragraph" style:parent-style-name="Text_20_body" style:list-style-name="L7">
      <style:paragraph-properties fo:margin-top="0in" fo:margin-bottom="0in" style:contextual-spacing="false"/>
    </style:style>
    <style:style style:name="P24" style:family="paragraph" style:parent-style-name="Text_20_body" style:list-style-name="L8"/>
    <style:style style:name="P25" style:family="paragraph" style:parent-style-name="Text_20_body" style:list-style-name="L8">
      <style:paragraph-properties fo:margin-top="0in" fo:margin-bottom="0in" style:contextual-spacing="false"/>
    </style:style>
    <style:style style:name="P26" style:family="paragraph" style:parent-style-name="Text_20_body" style:list-style-name="L9"/>
    <style:style style:name="P27" style:family="paragraph" style:parent-style-name="Text_20_body" style:list-style-name="L9">
      <style:paragraph-properties fo:margin-top="0in" fo:margin-bottom="0in" style:contextual-spacing="false"/>
    </style:style>
    <style:style style:name="P28" style:family="paragraph" style:parent-style-name="Text_20_body" style:list-style-name="L10"/>
    <style:style style:name="P29" style:family="paragraph" style:parent-style-name="Text_20_body" style:list-style-name="L10">
      <style:paragraph-properties fo:margin-top="0in" fo:margin-bottom="0in" style:contextual-spacing="false"/>
    </style:style>
    <style:style style:name="P30" style:family="paragraph" style:parent-style-name="Text_20_body" style:list-style-name="L11"/>
    <style:style style:name="P31" style:family="paragraph" style:parent-style-name="Text_20_body" style:list-style-name="L11">
      <style:paragraph-properties fo:margin-top="0in" fo:margin-bottom="0in" style:contextual-spacing="false"/>
    </style:style>
    <style:style style:name="P32" style:family="paragraph" style:parent-style-name="Text_20_body" style:list-style-name="L12"/>
    <style:style style:name="P33" style:family="paragraph" style:parent-style-name="Text_20_body" style:list-style-name="L12">
      <style:paragraph-properties fo:margin-top="0in" fo:margin-bottom="0in" style:contextual-spacing="false"/>
    </style:style>
    <style:style style:name="P34" style:family="paragraph" style:parent-style-name="Text_20_body" style:list-style-name="L13"/>
    <style:style style:name="P35" style:family="paragraph" style:parent-style-name="Text_20_body" style:list-style-name="L13">
      <style:paragraph-properties fo:margin-top="0in" fo:margin-bottom="0in" style:contextual-spacing="false"/>
    </style:style>
    <style:style style:name="P36" style:family="paragraph" style:parent-style-name="Text_20_body" style:list-style-name="L14"/>
    <style:style style:name="P37" style:family="paragraph" style:parent-style-name="Text_20_body" style:list-style-name="L14">
      <style:paragraph-properties fo:margin-top="0in" fo:margin-bottom="0in" style:contextual-spacing="false"/>
    </style:style>
    <style:style style:name="P38" style:family="paragraph" style:parent-style-name="Text_20_body" style:list-style-name="L14">
      <style:paragraph-properties fo:margin-left="0in" fo:margin-right="0in" fo:margin-top="0in" fo:margin-bottom="0in" style:contextual-spacing="false" fo:text-indent="0in" style:auto-text-indent="false" style:writing-mode="lr-tb"/>
    </style:style>
    <style:style style:name="P39" style:family="paragraph" style:parent-style-name="Text_20_body" style:list-style-name="L15"/>
    <style:style style:name="P40" style:family="paragraph" style:parent-style-name="Text_20_body" style:list-style-name="L15">
      <style:paragraph-properties fo:margin-top="0in" fo:margin-bottom="0in" style:contextual-spacing="false"/>
    </style:style>
    <style:style style:name="P41" style:family="paragraph" style:parent-style-name="Text_20_body" style:list-style-name="L16"/>
    <style:style style:name="P42" style:family="paragraph" style:parent-style-name="Text_20_body" style:list-style-name="L16">
      <style:paragraph-properties fo:margin-top="0in" fo:margin-bottom="0in" style:contextual-spacing="false"/>
    </style:style>
    <style:style style:name="P43" style:family="paragraph" style:parent-style-name="Text_20_body" style:list-style-name="L16">
      <style:paragraph-properties fo:margin-left="0in" fo:margin-right="0in" fo:margin-top="0in" fo:margin-bottom="0in" style:contextual-spacing="false" fo:text-indent="0in" style:auto-text-indent="false" style:writing-mode="lr-tb"/>
    </style:style>
    <style:style style:name="P44" style:family="paragraph" style:parent-style-name="Text_20_body" style:list-style-name="L17"/>
    <style:style style:name="P45" style:family="paragraph" style:parent-style-name="Text_20_body" style:list-style-name="L17">
      <style:paragraph-properties fo:margin-top="0in" fo:margin-bottom="0in" style:contextual-spacing="false"/>
    </style:style>
    <style:style style:name="P46" style:family="paragraph" style:parent-style-name="Text_20_body" style:list-style-name="L18"/>
    <style:style style:name="P47" style:family="paragraph" style:parent-style-name="Text_20_body" style:list-style-name="L18">
      <style:paragraph-properties fo:margin-top="0in" fo:margin-bottom="0in" style:contextual-spacing="false"/>
    </style:style>
    <style:style style:name="P48" style:family="paragraph" style:parent-style-name="Text_20_body" style:list-style-name="L19"/>
    <style:style style:name="P49" style:family="paragraph" style:parent-style-name="Text_20_body" style:list-style-name="L19">
      <style:paragraph-properties fo:margin-top="0in" fo:margin-bottom="0in" style:contextual-spacing="false"/>
    </style:style>
    <style:style style:name="P50" style:family="paragraph" style:parent-style-name="Text_20_body" style:list-style-name="L20"/>
    <style:style style:name="P51" style:family="paragraph" style:parent-style-name="Text_20_body" style:list-style-name="L20">
      <style:paragraph-properties fo:margin-top="0in" fo:margin-bottom="0in" style:contextual-spacing="false"/>
    </style:style>
    <style:style style:name="P52" style:family="paragraph" style:parent-style-name="Text_20_body" style:list-style-name="L21"/>
    <style:style style:name="P53" style:family="paragraph" style:parent-style-name="Text_20_body" style:list-style-name="L21">
      <style:paragraph-properties fo:margin-top="0in" fo:margin-bottom="0in" style:contextual-spacing="false"/>
    </style:style>
    <style:style style:name="P54" style:family="paragraph" style:parent-style-name="Text_20_body" style:list-style-name="L21">
      <style:paragraph-properties fo:margin-left="0in" fo:margin-right="0in" fo:margin-top="0in" fo:margin-bottom="0in" style:contextual-spacing="false" fo:text-indent="0in" style:auto-text-indent="false" style:writing-mode="lr-tb"/>
    </style:style>
    <style:style style:name="P55" style:family="paragraph" style:parent-style-name="Text_20_body" style:list-style-name="L22"/>
    <style:style style:name="P56" style:family="paragraph" style:parent-style-name="Text_20_body" style:list-style-name="L22">
      <style:paragraph-properties fo:margin-top="0in" fo:margin-bottom="0in" style:contextual-spacing="false"/>
    </style:style>
    <style:style style:name="P57" style:family="paragraph" style:parent-style-name="Text_20_body" style:list-style-name="L23"/>
    <style:style style:name="P58" style:family="paragraph" style:parent-style-name="Text_20_body" style:list-style-name="L23">
      <style:paragraph-properties fo:margin-top="0in" fo:margin-bottom="0in" style:contextual-spacing="false"/>
    </style:style>
    <style:style style:name="P59" style:family="paragraph" style:parent-style-name="Text_20_body" style:list-style-name="L23">
      <style:paragraph-properties fo:margin-left="0in" fo:margin-right="0in" fo:margin-top="0in" fo:margin-bottom="0in" style:contextual-spacing="false" fo:text-indent="0in" style:auto-text-indent="false" style:writing-mode="lr-tb"/>
    </style:style>
    <style:style style:name="P60" style:family="paragraph" style:parent-style-name="Text_20_body" style:list-style-name="L24"/>
    <style:style style:name="P61" style:family="paragraph" style:parent-style-name="Text_20_body" style:list-style-name="L24">
      <style:paragraph-properties fo:margin-top="0in" fo:margin-bottom="0in" style:contextual-spacing="false"/>
    </style:style>
    <style:style style:name="P62" style:family="paragraph" style:parent-style-name="Text_20_body" style:list-style-name="L24">
      <style:paragraph-properties fo:margin-left="0in" fo:margin-right="0in" fo:margin-top="0in" fo:margin-bottom="0in" style:contextual-spacing="false" fo:text-indent="0in" style:auto-text-indent="false" style:writing-mode="lr-tb"/>
    </style:style>
    <style:style style:name="P63" style:family="paragraph" style:parent-style-name="Text_20_body" style:list-style-name="L25"/>
    <style:style style:name="P64" style:family="paragraph" style:parent-style-name="Text_20_body" style:list-style-name="L25">
      <style:paragraph-properties fo:margin-top="0in" fo:margin-bottom="0in" style:contextual-spacing="false"/>
    </style:style>
    <style:style style:name="P65" style:family="paragraph" style:parent-style-name="Text_20_body" style:list-style-name="L26"/>
    <style:style style:name="P66" style:family="paragraph" style:parent-style-name="Text_20_body" style:list-style-name="L26">
      <style:paragraph-properties fo:margin-top="0in" fo:margin-bottom="0in" style:contextual-spacing="false"/>
    </style:style>
    <style:style style:name="P67" style:family="paragraph" style:parent-style-name="Text_20_body" style:list-style-name="L27"/>
    <style:style style:name="P68" style:family="paragraph" style:parent-style-name="Text_20_body" style:list-style-name="L28"/>
    <style:style style:name="P69" style:family="paragraph" style:parent-style-name="Text_20_body" style:list-style-name="L28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5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6">
      <text:list-level-style-number text:level="1" text:style-name="Numbering_20_Symbols" loext:num-list-format="%1%." style:num-suffix="." style:num-format="1" text:start-value="7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7">
      <text:list-level-style-number text:level="1" text:style-name="Numbering_20_Symbols" loext:num-list-format="%1%." style:num-suffix="." style:num-format="1" text:start-value="10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olicy Scout Dev Roadmap — CLI Alpha to Tauri-Ready Core</text:h>
      <text:h text:style-name="Heading_20_2" text:outline-level="2">Current State</text:h>
      <text:p text:style-name="Text_20_body">Policy Scout is currently a Python CLI-first local safety harness.</text:p>
      <text:p text:style-name="Text_20_body">Implemented and hardened:</text:p>
      <text:list text:style-name="L1">
        <text:list-item>
          <text:p text:style-name="P8"><text:span text:style-name="Source_20_Text">policy-scout check</text:span></text:p>
        </text:list-item>
        <text:list-item>
          <text:p text:style-name="P8"><text:span text:style-name="Source_20_Text">policy-scout run</text:span></text:p>
        </text:list-item>
        <text:list-item>
          <text:p text:style-name="P7">approvals</text:p>
        </text:list-item>
        <text:list-item>
          <text:p text:style-name="P7">sandbox install/review/migration</text:p>
        </text:list-item>
        <text:list-item>
          <text:p text:style-name="P7">project sweep</text:p>
        </text:list-item>
        <text:list-item>
          <text:p text:style-name="P7">quick system sweep</text:p>
        </text:list-item>
        <text:list-item>
          <text:p text:style-name="P7">Scout Reports</text:p>
        </text:list-item>
        <text:list-item>
          <text:p text:style-name="P7">SQLite/JSONL audit</text:p>
        </text:list-item>
        <text:list-item>
          <text:p text:style-name="P7">eval runner</text:p>
        </text:list-item>
        <text:list-item>
          <text:p text:style-name="P7">registry/schema validation</text:p>
        </text:list-item>
        <text:list-item>
          <text:p text:style-name="P7">report/audit UX polish</text:p>
        </text:list-item>
        <text:list-item>
          <text:p text:style-name="P7">local-first docs/source consolidation</text:p>
        </text:list-item>
        <text:list-item>
          <text:p text:style-name="P7">44 eval cases passing</text:p>
        </text:list-item>
        <text:list-item>
          <text:p text:style-name="P6">546 full tests passing after latest report/audit polish</text:p>
        </text:list-item>
      </text:list>
      <text:p text:style-name="Text_20_body">The next objective is not “ship yet.”</text:p>
      <text:p text:style-name="Text_20_body">The next objective is:</text:p>
      <text:p text:style-name="P3"><text:span text:style-name="Source_20_Text">Turn the CLI alpha into a coherent, dogfoodable local tool with a stable backend boundary.</text:span></text:p>
      <text:p text:style-name="Text_20_body">Tauri should come after the CLI/backend contracts are stable enough that the frontend is mostly consuming clean state, not inventing behavior.</text:p>
      <text:p text:style-name="Horizontal_20_Line"/>
      <text:h text:style-name="Heading_20_1" text:outline-level="1">Phase 1 — Dogfood and First-Run Reliability</text:h>
      <text:h text:style-name="Heading_20_2" text:outline-level="2">Goal</text:h>
      <text:p text:style-name="Text_20_body">Make Policy Scout easy to run, diagnose, and trust from any working directory.</text:p>
      <text:h text:style-name="P1" text:outline-level="2">1.1 <text:span text:style-name="Source_20_Text">policy-scout doctor</text:span></text:h>
      <text:p text:style-name="Text_20_body">Add:</text:p>
      <text:p text:style-name="P4"><text:span text:style-name="Source_20_Text">policy-scout doctor</text:span></text:p>
      <text:p text:style-name="P2"><text:span text:style-name="Source_20_Text">policy-scout doctor --json</text:span></text:p>
      <text:p text:style-name="Text_20_body"><text:soft-page-break/>Doctor should check:</text:p>
      <text:list text:style-name="L2">
        <text:list-item>
          <text:p text:style-name="P10">import/CLI health</text:p>
        </text:list-item>
        <text:list-item>
          <text:p text:style-name="P10">Python compatibility</text:p>
        </text:list-item>
        <text:list-item>
          <text:p text:style-name="P10">version/status</text:p>
        </text:list-item>
        <text:list-item>
          <text:p text:style-name="P10">registry loading</text:p>
        </text:list-item>
        <text:list-item>
          <text:p text:style-name="P10">eval case loading</text:p>
        </text:list-item>
        <text:list-item>
          <text:p text:style-name="P10">registry entry counts</text:p>
        </text:list-item>
        <text:list-item>
          <text:p text:style-name="P10">eval case count</text:p>
        </text:list-item>
        <text:list-item>
          <text:p text:style-name="P10">audit store availability</text:p>
        </text:list-item>
        <text:list-item>
          <text:p text:style-name="P10">report directory availability</text:p>
        </text:list-item>
        <text:list-item>
          <text:p text:style-name="P10">platform</text:p>
        </text:list-item>
        <text:list-item>
          <text:p text:style-name="P9">optional package managers: npm, pnpm, yarn, bun</text:p>
        </text:list-item>
      </text:list>
      <text:p text:style-name="Text_20_body">It should not:</text:p>
      <text:list text:style-name="L3">
        <text:list-item>
          <text:p text:style-name="P12">run sweeps</text:p>
        </text:list-item>
        <text:list-item>
          <text:p text:style-name="P12">inspect secrets</text:p>
        </text:list-item>
        <text:list-item>
          <text:p text:style-name="P12">run network commands</text:p>
        </text:list-item>
        <text:list-item>
          <text:p text:style-name="P12">mutate projects</text:p>
        </text:list-item>
        <text:list-item>
          <text:p text:style-name="P12">create reports</text:p>
        </text:list-item>
        <text:list-item>
          <text:p text:style-name="P11">attempt remediation</text:p>
        </text:list-item>
      </text:list>
      <text:p text:style-name="Text_20_body">Expected outcome:</text:p>
      <text:p text:style-name="P3"><text:span text:style-name="Source_20_Text">A user can immediately tell whether Policy Scout is installed and operational.</text:span></text:p>
      <text:h text:style-name="Heading_20_2" text:outline-level="2">1.2 Dogfood Demo Repo Pass</text:h>
      <text:p text:style-name="Text_20_body">Use a temp project and run:</text:p>
      <text:p text:style-name="P4"><text:span text:style-name="Source_20_Text">policy-scout doctor</text:span></text:p>
      <text:p text:style-name="P5"><text:span text:style-name="Source_20_Text">policy-scout check -- npm install lodash</text:span></text:p>
      <text:p text:style-name="P5"><text:span text:style-name="Source_20_Text">policy-scout run -- echo hello</text:span></text:p>
      <text:p text:style-name="P5"><text:span text:style-name="Source_20_Text">policy-scout eval run</text:span></text:p>
      <text:p text:style-name="P5"><text:span text:style-name="Source_20_Text">policy-scout sweep project</text:span></text:p>
      <text:p text:style-name="P5"><text:span text:style-name="Source_20_Text">policy-scout report list</text:span></text:p>
      <text:p text:style-name="P2"><text:span text:style-name="Source_20_Text">policy-scout audit stats</text:span></text:p>
      <text:p text:style-name="Text_20_body">Capture friction.</text:p>
      <text:p text:style-name="Text_20_body">Do not overbuild yet.</text:p>
      <text:h text:style-name="Heading_20_2" text:outline-level="2">Done When</text:h>
      <text:list text:style-name="L4">
        <text:list-item>
          <text:p text:style-name="P15"><text:span text:style-name="Source_20_Text">doctor</text:span> works from inside and outside the repo after install.</text:p>
        </text:list-item>
        <text:list-item>
          <text:p text:style-name="P14">JSON output is stable.</text:p>
        </text:list-item>
        <text:list-item>
          <text:p text:style-name="P14">Missing optional package managers are warnings, not errors.</text:p>
        </text:list-item>
        <text:list-item>
          <text:p text:style-name="P14">CLI explains next steps when setup is incomplete.</text:p>
        </text:list-item>
        <text:list-item>
          <text:p text:style-name="P13">Full test suite passes.</text:p>
        </text:list-item>
      </text:list>
      <text:p text:style-name="Horizontal_20_Line"/>
      <text:h text:style-name="Heading_20_1" text:outline-level="1"><text:soft-page-break/>Phase 2 — CLI UX Consistency Pass</text:h>
      <text:h text:style-name="Heading_20_2" text:outline-level="2">Goal</text:h>
      <text:p text:style-name="Text_20_body">Make all CLI surfaces feel like one product.</text:p>
      <text:p text:style-name="Text_20_body">Focus on consistency, not new features.</text:p>
      <text:h text:style-name="Heading_20_2" text:outline-level="2">2.1 Command Output Consistency</text:h>
      <text:p text:style-name="Text_20_body">Review:</text:p>
      <text:p text:style-name="P4"><text:span text:style-name="Source_20_Text">policy-scout check</text:span></text:p>
      <text:p text:style-name="P5"><text:span text:style-name="Source_20_Text">policy-scout run</text:span></text:p>
      <text:p text:style-name="P5"><text:span text:style-name="Source_20_Text">policy-scout sandbox</text:span></text:p>
      <text:p text:style-name="P5"><text:span text:style-name="Source_20_Text">policy-scout sweep project</text:span></text:p>
      <text:p text:style-name="P5"><text:span text:style-name="Source_20_Text">policy-scout sweep quick</text:span></text:p>
      <text:p text:style-name="P5"><text:span text:style-name="Source_20_Text">policy-scout approvals</text:span></text:p>
      <text:p text:style-name="P5"><text:span text:style-name="Source_20_Text">policy-scout report</text:span></text:p>
      <text:p text:style-name="P5"><text:span text:style-name="Source_20_Text">policy-scout audit</text:span></text:p>
      <text:p text:style-name="P5"><text:span text:style-name="Source_20_Text">policy-scout eval</text:span></text:p>
      <text:p text:style-name="P2"><text:span text:style-name="Source_20_Text">policy-scout doctor</text:span></text:p>
      <text:p text:style-name="Text_20_body">Standardize:</text:p>
      <text:list text:style-name="L5">
        <text:list-item>
          <text:p text:style-name="P17">headings</text:p>
        </text:list-item>
        <text:list-item>
          <text:p text:style-name="P17">decision display</text:p>
        </text:list-item>
        <text:list-item>
          <text:p text:style-name="P17">risk display</text:p>
        </text:list-item>
        <text:list-item>
          <text:p text:style-name="P17">IDs</text:p>
        </text:list-item>
        <text:list-item>
          <text:p text:style-name="P17">redaction notes</text:p>
        </text:list-item>
        <text:list-item>
          <text:p text:style-name="P17">recommended next action</text:p>
        </text:list-item>
        <text:list-item>
          <text:p text:style-name="P18"><text:span text:style-name="Source_20_Text">could_not_verify</text:span></text:p>
        </text:list-item>
        <text:list-item>
          <text:p text:style-name="P17">exit codes</text:p>
        </text:list-item>
        <text:list-item>
          <text:p text:style-name="P16">JSON shape where practical</text:p>
        </text:list-item>
      </text:list>
      <text:h text:style-name="Heading_20_2" text:outline-level="2">2.2 Help Text Pass</text:h>
      <text:p text:style-name="P19">Improve <text:span text:style-name="Source_20_Text">--help</text:span> for each command.</text:p>
      <text:p text:style-name="Text_20_body">The help should answer:</text:p>
      <text:list text:style-name="L6">
        <text:list-item>
          <text:p text:style-name="P21">what the command does</text:p>
        </text:list-item>
        <text:list-item>
          <text:p text:style-name="P21">whether it executes anything</text:p>
        </text:list-item>
        <text:list-item>
          <text:p text:style-name="P21">whether it mutates anything</text:p>
        </text:list-item>
        <text:list-item>
          <text:p text:style-name="P21">whether it writes audit/report state</text:p>
        </text:list-item>
        <text:list-item>
          <text:p text:style-name="P20">whether it supports JSON</text:p>
        </text:list-item>
      </text:list>
      <text:h text:style-name="Heading_20_2" text:outline-level="2">2.3 Error Message Pass</text:h>
      <text:p text:style-name="Text_20_body">Improve user-facing errors for:</text:p>
      <text:list text:style-name="L7">
        <text:list-item>
          <text:p text:style-name="P23">missing package install</text:p>
        </text:list-item>
        <text:list-item>
          <text:p text:style-name="P23"><text:soft-page-break/>invalid registry</text:p>
        </text:list-item>
        <text:list-item>
          <text:p text:style-name="P23">missing report ID</text:p>
        </text:list-item>
        <text:list-item>
          <text:p text:style-name="P23">missing approval ID</text:p>
        </text:list-item>
        <text:list-item>
          <text:p text:style-name="P23">invalid sandbox ID</text:p>
        </text:list-item>
        <text:list-item>
          <text:p text:style-name="P23">unavailable package manager</text:p>
        </text:list-item>
        <text:list-item>
          <text:p text:style-name="P22">audit/report path issue</text:p>
        </text:list-item>
      </text:list>
      <text:h text:style-name="Heading_20_2" text:outline-level="2">Done When</text:h>
      <text:list text:style-name="L8">
        <text:list-item>
          <text:p text:style-name="P25">A new user can infer safe usage from help text.</text:p>
        </text:list-item>
        <text:list-item>
          <text:p text:style-name="P25">Error messages suggest practical next steps.</text:p>
        </text:list-item>
        <text:list-item>
          <text:p text:style-name="P25">JSON mode stays machine-readable.</text:p>
        </text:list-item>
        <text:list-item>
          <text:p text:style-name="P25">No policy/classifier behavior changes unless a real bug is found.</text:p>
        </text:list-item>
        <text:list-item>
          <text:p text:style-name="P24">Full tests pass.</text:p>
        </text:list-item>
      </text:list>
      <text:p text:style-name="Horizontal_20_Line"/>
      <text:h text:style-name="Heading_20_1" text:outline-level="1">Phase 3 — Demo Scenario Harness</text:h>
      <text:h text:style-name="Heading_20_2" text:outline-level="2">Goal</text:h>
      <text:p text:style-name="Text_20_body">Create a safe, repeatable demo path that shows Policy Scout’s value without needing a real infected project.</text:p>
      <text:p text:style-name="Text_20_body">Possible command:</text:p>
      <text:p text:style-name="P4"><text:span text:style-name="Source_20_Text">policy-scout demo create</text:span></text:p>
      <text:p text:style-name="P5"><text:span text:style-name="Source_20_Text">policy-scout demo run</text:span></text:p>
      <text:p text:style-name="P2"><text:span text:style-name="Source_20_Text">policy-scout demo cleanup</text:span></text:p>
      <text:p text:style-name="Text_20_body">Or keep it simpler:</text:p>
      <text:p text:style-name="P3"><text:span text:style-name="Source_20_Text">policy-scout demo --safe</text:span></text:p>
      <text:h text:style-name="Heading_20_2" text:outline-level="2">Demo Should Show</text:h>
      <text:list text:style-name="L9">
        <text:list-item>
          <text:p text:style-name="P27">safe read allowed</text:p>
        </text:list-item>
        <text:list-item>
          <text:p text:style-name="P27">package install routed to sandbox-first</text:p>
        </text:list-item>
        <text:list-item>
          <text:p text:style-name="P27">network execution denied</text:p>
        </text:list-item>
        <text:list-item>
          <text:p text:style-name="P27">credential-adjacent command denied and alerted</text:p>
        </text:list-item>
        <text:list-item>
          <text:p text:style-name="P27">project sweep finding</text:p>
        </text:list-item>
        <text:list-item>
          <text:p text:style-name="P27">report generated</text:p>
        </text:list-item>
        <text:list-item>
          <text:p text:style-name="P26">audit events created</text:p>
        </text:list-item>
      </text:list>
      <text:h text:style-name="Heading_20_2" text:outline-level="2">Important Constraint</text:h>
      <text:p text:style-name="Text_20_body">Demo mode must be safe and local.</text:p>
      <text:p text:style-name="Text_20_body">It should use a temp directory.</text:p>
      <text:p text:style-name="Text_20_body"><text:soft-page-break/>It should not run real package installs unless explicitly requested.</text:p>
      <text:p text:style-name="Text_20_body">It should not touch user secrets.</text:p>
      <text:h text:style-name="Heading_20_2" text:outline-level="2">Done When</text:h>
      <text:list text:style-name="L10">
        <text:list-item>
          <text:p text:style-name="P29">One command can create a demo project.</text:p>
        </text:list-item>
        <text:list-item>
          <text:p text:style-name="P29">The demo produces visible reports/audit trail.</text:p>
        </text:list-item>
        <text:list-item>
          <text:p text:style-name="P29">It is safe enough to recommend in README.</text:p>
        </text:list-item>
        <text:list-item>
          <text:p text:style-name="P28">Tests verify demo does not mutate outside its temp workspace.</text:p>
        </text:list-item>
      </text:list>
      <text:p text:style-name="Horizontal_20_Line"/>
      <text:h text:style-name="Heading_20_1" text:outline-level="1">Phase 4 — Sandbox/User Flow Polish</text:h>
      <text:h text:style-name="Heading_20_2" text:outline-level="2">Goal</text:h>
      <text:p text:style-name="Text_20_body">Make sandbox-to-host workflow feel trustworthy and understandable.</text:p>
      <text:p text:style-name="Text_20_body">Focus areas:</text:p>
      <text:list text:style-name="L11">
        <text:list-item>
          <text:p text:style-name="P31">sandbox result summary</text:p>
        </text:list-item>
        <text:list-item>
          <text:p text:style-name="P31">migration dry-run output</text:p>
        </text:list-item>
        <text:list-item>
          <text:p text:style-name="P31">migration approval clarity</text:p>
        </text:list-item>
        <text:list-item>
          <text:p text:style-name="P31">package manager-specific lockfile behavior</text:p>
        </text:list-item>
        <text:list-item>
          <text:p text:style-name="P31">high/critical finding block behavior</text:p>
        </text:list-item>
        <text:list-item>
          <text:p text:style-name="P31">backup explanation</text:p>
        </text:list-item>
        <text:list-item>
          <text:p text:style-name="P30">report linkage</text:p>
        </text:list-item>
      </text:list>
      <text:h text:style-name="Heading_20_2" text:outline-level="2">Test Paths</text:h>
      <text:p text:style-name="Text_20_body">Exercise:</text:p>
      <text:p text:style-name="P4"><text:span text:style-name="Source_20_Text">policy-scout sandbox -- npm install &lt;small-package&gt;</text:span></text:p>
      <text:p text:style-name="P5"><text:span text:style-name="Source_20_Text">policy-scout sandbox --dry-run &lt;sandbox_id&gt;</text:span></text:p>
      <text:p text:style-name="P2"><text:span text:style-name="Source_20_Text">policy-scout sandbox --yes &lt;sandbox_id&gt;</text:span></text:p>
      <text:p text:style-name="Text_20_body">Or whatever the final migration syntax currently is.</text:p>
      <text:h text:style-name="Heading_20_2" text:outline-level="2">Polish Targets</text:h>
      <text:list text:style-name="L12">
        <text:list-item>
          <text:p text:style-name="P33">clearer “host not mutated” language</text:p>
        </text:list-item>
        <text:list-item>
          <text:p text:style-name="P33">clearer migration preview</text:p>
        </text:list-item>
        <text:list-item>
          <text:p text:style-name="P33">show exact files eligible for migration</text:p>
        </text:list-item>
        <text:list-item>
          <text:p text:style-name="P33">show exact files never migrated</text:p>
        </text:list-item>
        <text:list-item>
          <text:p text:style-name="P33">show report ID after sandbox</text:p>
        </text:list-item>
        <text:list-item>
          <text:p text:style-name="P33">show audit IDs where useful</text:p>
        </text:list-item>
        <text:list-item>
          <text:p text:style-name="P32">better failure messages when package manager missing</text:p>
        </text:list-item>
      </text:list>
      <text:h text:style-name="Heading_20_2" text:outline-level="2"><text:soft-page-break/>Done When</text:h>
      <text:list text:style-name="L13">
        <text:list-item>
          <text:p text:style-name="P35">Sandbox migration feels reviewable, not magical.</text:p>
        </text:list-item>
        <text:list-item>
          <text:p text:style-name="P35">High/critical findings block migration.</text:p>
        </text:list-item>
        <text:list-item>
          <text:p text:style-name="P35">Backups are clearly explained.</text:p>
        </text:list-item>
        <text:list-item>
          <text:p text:style-name="P34">Tests cover dry-run, blocked migration, successful migration, and no arbitrary file copy.</text:p>
        </text:list-item>
      </text:list>
      <text:p text:style-name="Horizontal_20_Line"/>
      <text:h text:style-name="Heading_20_1" text:outline-level="1">Phase 5 — Audit/Report Contract Stabilization</text:h>
      <text:h text:style-name="Heading_20_2" text:outline-level="2">Goal</text:h>
      <text:p text:style-name="Text_20_body">Define the backend contract that a future Tauri UI will consume.</text:p>
      <text:p text:style-name="Text_20_body">This is the “frontend prep” phase, but still CLI/backend only.</text:p>
      <text:h text:style-name="Heading_20_2" text:outline-level="2">Stabilize JSON Shapes For</text:h>
      <text:p text:style-name="P4"><text:span text:style-name="Source_20_Text">doctor --json</text:span></text:p>
      <text:p text:style-name="P5"><text:span text:style-name="Source_20_Text">check --json</text:span></text:p>
      <text:p text:style-name="P5"><text:span text:style-name="Source_20_Text">sweep project --json</text:span></text:p>
      <text:p text:style-name="P5"><text:span text:style-name="Source_20_Text">sweep quick --json</text:span></text:p>
      <text:p text:style-name="P5"><text:span text:style-name="Source_20_Text">report show --json</text:span></text:p>
      <text:p text:style-name="P5"><text:span text:style-name="Source_20_Text">report list --json</text:span></text:p>
      <text:p text:style-name="P5"><text:span text:style-name="Source_20_Text">audit list --json</text:span></text:p>
      <text:p text:style-name="P5"><text:span text:style-name="Source_20_Text">audit show --json</text:span></text:p>
      <text:p text:style-name="P5"><text:span text:style-name="Source_20_Text">audit stats --json</text:span></text:p>
      <text:p text:style-name="P2"><text:span text:style-name="Source_20_Text">eval run --json, if supported</text:span></text:p>
      <text:h text:style-name="Heading_20_2" text:outline-level="2">Add Contract Tests</text:h>
      <text:p text:style-name="Text_20_body">Tests should verify:</text:p>
      <text:list text:style-name="L14">
        <text:list-item>
          <text:p text:style-name="P37">required fields exist</text:p>
        </text:list-item>
        <text:list-item>
          <text:p text:style-name="P37">redaction flag exists</text:p>
        </text:list-item>
        <text:list-item>
          <text:p text:style-name="P37">IDs are stable</text:p>
        </text:list-item>
        <text:list-item>
          <text:p text:style-name="P37">report types are correct</text:p>
        </text:list-item>
        <text:list-item>
          <text:p text:style-name="P37">audit IDs are included</text:p>
        </text:list-item>
        <text:list-item>
          <text:p text:style-name="P37">findings include severity/confidence</text:p>
        </text:list-item>
        <text:list-item>
          <text:p text:style-name="P38"><text:span text:style-name="Source_20_Text">could_not_verify</text:span> is present where relevant</text:p>
        </text:list-item>
        <text:list-item>
          <text:p text:style-name="P36">JSON output does not include raw secrets</text:p>
        </text:list-item>
      </text:list>
      <text:h text:style-name="Heading_20_2" text:outline-level="2">Done When</text:h>
      <text:list text:style-name="L15">
        <text:list-item>
          <text:p text:style-name="P40">Tauri can be treated as a consumer of stable JSON/API-ish output.</text:p>
        </text:list-item>
        <text:list-item>
          <text:p text:style-name="P40">Markdown reports remain human-facing.</text:p>
        </text:list-item>
        <text:list-item>
          <text:p text:style-name="P40">JSON reports become the machine contract.</text:p>
        </text:list-item>
        <text:list-item>
          <text:p text:style-name="P39"><text:soft-page-break/>Full test suite passes.</text:p>
        </text:list-item>
      </text:list>
      <text:p text:style-name="Horizontal_20_Line"/>
      <text:h text:style-name="Heading_20_1" text:outline-level="1">Phase 6 — Packaging and Local Install Readiness</text:h>
      <text:h text:style-name="Heading_20_2" text:outline-level="2">Goal</text:h>
      <text:p text:style-name="Text_20_body">Make Policy Scout easy to install locally and run from anywhere.</text:p>
      <text:p text:style-name="Text_20_body">This should happen after the CLI feels good, not before.</text:p>
      <text:h text:style-name="Heading_20_2" text:outline-level="2">Work Items</text:h>
      <text:list text:style-name="L16">
        <text:list-item>
          <text:p text:style-name="P43">verify <text:span text:style-name="Source_20_Text">pip install -e .</text:span></text:p>
        </text:list-item>
        <text:list-item>
          <text:p text:style-name="P42">verify console script</text:p>
        </text:list-item>
        <text:list-item>
          <text:p text:style-name="P42">verify package data inclusion:</text:p>
          <text:list>
            <text:list-item>
              <text:p text:style-name="P42">registries</text:p>
            </text:list-item>
            <text:list-item>
              <text:p text:style-name="P42">eval cases</text:p>
            </text:list-item>
            <text:list-item>
              <text:p text:style-name="P42">default data</text:p>
            </text:list-item>
          </text:list>
        </text:list-item>
        <text:list-item>
          <text:p text:style-name="P42">verify installed CLI works outside repo</text:p>
        </text:list-item>
        <text:list-item>
          <text:p text:style-name="P42">add install smoke test if practical</text:p>
        </text:list-item>
        <text:list-item>
          <text:p text:style-name="P42">add simple release checklist</text:p>
        </text:list-item>
        <text:list-item>
          <text:p text:style-name="P41">ensure version metadata is consistent</text:p>
        </text:list-item>
      </text:list>
      <text:h text:style-name="Heading_20_2" text:outline-level="2">Done When</text:h>
      <text:p text:style-name="Text_20_body">From outside the repo:</text:p>
      <text:p text:style-name="P4"><text:span text:style-name="Source_20_Text">policy-scout doctor</text:span></text:p>
      <text:p text:style-name="P5"><text:span text:style-name="Source_20_Text">policy-scout check -- npm install lodash</text:span></text:p>
      <text:p text:style-name="P2"><text:span text:style-name="Source_20_Text">policy-scout eval run</text:span></text:p>
      <text:p text:style-name="Text_20_body">works cleanly.</text:p>
      <text:p text:style-name="Horizontal_20_Line"/>
      <text:h text:style-name="Heading_20_1" text:outline-level="1">Phase 7 — README / Portfolio Polish</text:h>
      <text:h text:style-name="Heading_20_2" text:outline-level="2">Goal</text:h>
      <text:p text:style-name="Text_20_body">Make the repo impressive and honest for employers.</text:p>
      <text:p text:style-name="Text_20_body">README should show:</text:p>
      <text:list text:style-name="L17">
        <text:list-item>
          <text:p text:style-name="P45">what Policy Scout is</text:p>
        </text:list-item>
        <text:list-item>
          <text:p text:style-name="P45">why it exists</text:p>
        </text:list-item>
        <text:list-item>
          <text:p text:style-name="P45">what it protects against</text:p>
        </text:list-item>
        <text:list-item>
          <text:p text:style-name="P45"><text:soft-page-break/>what it does not claim</text:p>
        </text:list-item>
        <text:list-item>
          <text:p text:style-name="P45">quick install</text:p>
        </text:list-item>
        <text:list-item>
          <text:p text:style-name="P45">quick demo</text:p>
        </text:list-item>
        <text:list-item>
          <text:p text:style-name="P45">example output</text:p>
        </text:list-item>
        <text:list-item>
          <text:p text:style-name="P45">current status</text:p>
        </text:list-item>
        <text:list-item>
          <text:p text:style-name="P45">architecture diagram</text:p>
        </text:list-item>
        <text:list-item>
          <text:p text:style-name="P45">test count</text:p>
        </text:list-item>
        <text:list-item>
          <text:p text:style-name="P44">roadmap</text:p>
        </text:list-item>
      </text:list>
      <text:h text:style-name="Heading_20_2" text:outline-level="2">Include</text:h>
      <text:list text:style-name="L18">
        <text:list-item>
          <text:p text:style-name="P47">CLI demo block</text:p>
        </text:list-item>
        <text:list-item>
          <text:p text:style-name="P47">screenshot or terminal output sample</text:p>
        </text:list-item>
        <text:list-item>
          <text:p text:style-name="P47">“safety principles” section</text:p>
        </text:list-item>
        <text:list-item>
          <text:p text:style-name="P47">“not a full antivirus” limitation</text:p>
        </text:list-item>
        <text:list-item>
          <text:p text:style-name="P47">“local-first” section</text:p>
        </text:list-item>
        <text:list-item>
          <text:p text:style-name="P46">“why this matters for agentic coding” section</text:p>
        </text:list-item>
      </text:list>
      <text:h text:style-name="Heading_20_2" text:outline-level="2">Done When</text:h>
      <text:p text:style-name="Text_20_body">A reviewer can understand the project in 60 seconds and trust that it is not overclaiming.</text:p>
      <text:p text:style-name="Horizontal_20_Line"/>
      <text:h text:style-name="Heading_20_1" text:outline-level="1">Phase 8 — Diagram / Graph Export Prep</text:h>
      <text:h text:style-name="Heading_20_2" text:outline-level="2">Goal</text:h>
      <text:p text:style-name="Text_20_body">Make architecture and future Tauri/LumaWeave views easier to reason about.</text:p>
      <text:p text:style-name="Text_20_body">This is not the frontend yet.</text:p>
      <text:p text:style-name="Text_20_body">Work items:</text:p>
      <text:list text:style-name="L19">
        <text:list-item>
          <text:p text:style-name="P49">render Mermaid diagrams to SVG</text:p>
        </text:list-item>
        <text:list-item>
          <text:p text:style-name="P49">update diagram manifest if needed</text:p>
        </text:list-item>
        <text:list-item>
          <text:p text:style-name="P49">decide which JSON objects map to visual nodes</text:p>
        </text:list-item>
        <text:list-item>
          <text:p text:style-name="P49">define report/audit graph export shape only if useful</text:p>
        </text:list-item>
        <text:list-item>
          <text:p text:style-name="P48">keep graph export deferred unless simple</text:p>
        </text:list-item>
      </text:list>
      <text:h text:style-name="Heading_20_2" text:outline-level="2">Done When</text:h>
      <text:list text:style-name="L20">
        <text:list-item>
          <text:p text:style-name="P51">Core diagrams render.</text:p>
        </text:list-item>
        <text:list-item>
          <text:p text:style-name="P51">README can include 1–2 visuals.</text:p>
        </text:list-item>
        <text:list-item>
          <text:p text:style-name="P51">Future frontend has obvious entities:</text:p>
          <text:list>
            <text:list-item>
              <text:p text:style-name="P51">request</text:p>
            </text:list-item>
            <text:list-item>
              <text:p text:style-name="P51">decision</text:p>
            </text:list-item>
            <text:list-item>
              <text:p text:style-name="P51">finding</text:p>
            </text:list-item>
            <text:list-item>
              <text:p text:style-name="P51"><text:soft-page-break/>report</text:p>
            </text:list-item>
            <text:list-item>
              <text:p text:style-name="P51">audit event</text:p>
            </text:list-item>
            <text:list-item>
              <text:p text:style-name="P50">sandbox result</text:p>
            </text:list-item>
          </text:list>
        </text:list-item>
      </text:list>
      <text:p text:style-name="Horizontal_20_Line"/>
      <text:h text:style-name="Heading_20_1" text:outline-level="1">Phase 9 — Tauri Frontend Investigation Gate</text:h>
      <text:p text:style-name="Text_20_body">Do not start Tauri until the following are true:</text:p>
      <text:h text:style-name="Heading_20_2" text:outline-level="2">Required Before Tauri</text:h>
      <text:list text:style-name="L21">
        <text:list-item>
          <text:p text:style-name="P53">CLI is usable from outside repo.</text:p>
        </text:list-item>
        <text:list-item>
          <text:p text:style-name="P54"><text:span text:style-name="Source_20_Text">doctor</text:span> exists.</text:p>
        </text:list-item>
        <text:list-item>
          <text:p text:style-name="P53">JSON output contracts are stable enough.</text:p>
        </text:list-item>
        <text:list-item>
          <text:p text:style-name="P53">reports/audit JSON are redaction-safe.</text:p>
        </text:list-item>
        <text:list-item>
          <text:p text:style-name="P53">sandbox flow is understandable.</text:p>
        </text:list-item>
        <text:list-item>
          <text:p text:style-name="P53">README demo works.</text:p>
        </text:list-item>
        <text:list-item>
          <text:p text:style-name="P53">package data/install path works.</text:p>
        </text:list-item>
        <text:list-item>
          <text:p text:style-name="P53">core tests pass.</text:p>
        </text:list-item>
        <text:list-item>
          <text:p text:style-name="P52">no major docs/status drift.</text:p>
        </text:list-item>
      </text:list>
      <text:h text:style-name="Heading_20_2" text:outline-level="2">Tauri Investigation Questions</text:h>
      <text:p text:style-name="Text_20_body">When ready, investigate:</text:p>
      <text:list text:style-name="L22">
        <text:list-item>
          <text:p text:style-name="P56">Should Tauri call CLI subprocesses or a local Python API?</text:p>
        </text:list-item>
        <text:list-item>
          <text:p text:style-name="P56">Should Policy Scout expose a local API, or should Tauri bundle/call Python directly?</text:p>
        </text:list-item>
        <text:list-item>
          <text:p text:style-name="P56">What is the minimum UI?</text:p>
        </text:list-item>
        <text:list-item>
          <text:p text:style-name="P56">Which views are needed first?</text:p>
        </text:list-item>
        <text:list-item>
          <text:p text:style-name="P56">How does the UI avoid becoming a policy authority?</text:p>
        </text:list-item>
        <text:list-item>
          <text:p text:style-name="P56">How are approvals handled safely?</text:p>
        </text:list-item>
        <text:list-item>
          <text:p text:style-name="P56">How are reports displayed without leaking secrets?</text:p>
        </text:list-item>
        <text:list-item>
          <text:p text:style-name="P56">How are audit logs queried?</text:p>
        </text:list-item>
        <text:list-item>
          <text:p text:style-name="P55">How does UI packaging work on Linux first?</text:p>
        </text:list-item>
      </text:list>
      <text:h text:style-name="Heading_20_2" text:outline-level="2">First UI Should Be Small</text:h>
      <text:p text:style-name="Text_20_body">Initial Tauri UI should probably show:</text:p>
      <text:list text:style-name="L23">
        <text:list-item>
          <text:p text:style-name="P59">dashboard health from <text:span text:style-name="Source_20_Text">doctor</text:span></text:p>
        </text:list-item>
        <text:list-item>
          <text:p text:style-name="P58">recent decisions</text:p>
        </text:list-item>
        <text:list-item>
          <text:p text:style-name="P58">recent reports</text:p>
        </text:list-item>
        <text:list-item>
          <text:p text:style-name="P58">recent audit events</text:p>
        </text:list-item>
        <text:list-item>
          <text:p text:style-name="P58">run/check command input</text:p>
        </text:list-item>
        <text:list-item>
          <text:p text:style-name="P58">report viewer</text:p>
        </text:list-item>
        <text:list-item>
          <text:p text:style-name="P57">approval queue viewer</text:p>
        </text:list-item>
      </text:list>
      <text:p text:style-name="Text_20_body"><text:soft-page-break/>Do not build a giant dashboard first.</text:p>
      <text:p text:style-name="Horizontal_20_Line"/>
      <text:h text:style-name="Heading_20_1" text:outline-level="1">Recommended Build Order From Here</text:h>
      <text:h text:style-name="Heading_20_2" text:outline-level="2">Today / Tonight</text:h>
      <text:list text:style-name="L24">
        <text:list-item>
          <text:p text:style-name="P62"><text:span text:style-name="Source_20_Text">policy-scout doctor</text:span></text:p>
        </text:list-item>
        <text:list-item>
          <text:p text:style-name="P61">CLI dogfood pass</text:p>
        </text:list-item>
        <text:list-item>
          <text:p text:style-name="P60">CLI UX consistency review</text:p>
        </text:list-item>
      </text:list>
      <text:h text:style-name="Heading_20_2" text:outline-level="2">Next 1–2 Days</text:h>
      <text:list text:style-name="L25">
        <text:list-item>
          <text:p text:style-name="P64">demo scenario harness</text:p>
        </text:list-item>
        <text:list-item>
          <text:p text:style-name="P64">sandbox flow polish</text:p>
        </text:list-item>
        <text:list-item>
          <text:p text:style-name="P63">JSON contract tests</text:p>
        </text:list-item>
      </text:list>
      <text:h text:style-name="Heading_20_2" text:outline-level="2">Next 2–4 Days</text:h>
      <text:list text:style-name="L26">
        <text:list-item>
          <text:p text:style-name="P66">packaging/local install readiness</text:p>
        </text:list-item>
        <text:list-item>
          <text:p text:style-name="P66">README/portfolio polish</text:p>
        </text:list-item>
        <text:list-item>
          <text:p text:style-name="P65">render diagrams</text:p>
        </text:list-item>
      </text:list>
      <text:h text:style-name="Heading_20_2" text:outline-level="2">After That</text:h>
      <text:list text:style-name="L27">
        <text:list-item>
          <text:p text:style-name="P67">Tauri frontend investigation</text:p>
        </text:list-item>
      </text:list>
      <text:p text:style-name="Horizontal_20_Line"/>
      <text:h text:style-name="Heading_20_1" text:outline-level="1">Explicitly Defer</text:h>
      <text:p text:style-name="Text_20_body">Do not do these yet:</text:p>
      <text:list text:style-name="L28">
        <text:list-item>
          <text:p text:style-name="P69">MCP server</text:p>
        </text:list-item>
        <text:list-item>
          <text:p text:style-name="P69">editor extension</text:p>
        </text:list-item>
        <text:list-item>
          <text:p text:style-name="P69">Tauri UI</text:p>
        </text:list-item>
        <text:list-item>
          <text:p text:style-name="P69">remote/cloud sync</text:p>
        </text:list-item>
        <text:list-item>
          <text:p text:style-name="P69">autonomous remediation</text:p>
        </text:list-item>
        <text:list-item>
          <text:p text:style-name="P69">risk/clutch implementation</text:p>
        </text:list-item>
        <text:list-item>
          <text:p text:style-name="P69">Docker sandbox backend</text:p>
        </text:list-item>
        <text:list-item>
          <text:p text:style-name="P69">background daemon</text:p>
        </text:list-item>
        <text:list-item>
          <text:p text:style-name="P69">scheduled scans</text:p>
        </text:list-item>
        <text:list-item>
          <text:p text:style-name="P68">community rule marketplace</text:p>
        </text:list-item>
      </text:list>
      <text:p text:style-name="Text_20_body">These are valuable later, but they add surface area before the CLI/backend contract is stable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07T14:34:21.920629691</meta:creation-date>
    <dc:date>2026-06-07T14:35:20.513494598</dc:date>
    <meta:editing-duration>PT59S</meta:editing-duration>
    <meta:editing-cycles>1</meta:editing-cycles>
    <meta:document-statistic meta:table-count="0" meta:image-count="0" meta:object-count="0" meta:page-count="10" meta:paragraph-count="329" meta:word-count="1547" meta:character-count="9129" meta:non-whitespace-character-count="8108"/>
    <meta:generator>LibreOffice/24.2.7.2$Linux_X86_64 LibreOffice_project/420$Build-2</meta:generator>
  </office:meta>
</office:document-meta>
</file>